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vapi-ynESt5lWX1mYVffW42nER7ZPOmXAlIFSP7M9iMePTMcsRX3YXnrjqKbNnxVoxuc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1:08:08.940994220</meta:creation-date>
    <dc:date>2026-05-12T14:27:50.773640102</dc:date>
    <meta:editing-duration>PT46M37S</meta:editing-duration>
    <meta:editing-cycles>1</meta:editing-cycles>
    <meta:document-statistic meta:table-count="0" meta:image-count="0" meta:object-count="0" meta:page-count="1" meta:paragraph-count="1" meta:word-count="1" meta:character-count="70" meta:non-whitespace-character-count="70"/>
    <meta:generator>LibreOffice/24.2.7.2$Linux_X86_64 LibreOffice_project/420$Build-2</meta:generator>
  </office:meta>
</office:document-meta>
</file>